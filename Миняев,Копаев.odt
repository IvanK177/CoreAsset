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rsid="00198ecf" officeooo:paragraph-rsid="00198ecf"/>
    </style:style>
    <style:style style:name="P2" style:family="paragraph" style:parent-style-name="Standard">
      <style:text-properties officeooo:rsid="001b63ef" officeooo:paragraph-rsid="001b63ef"/>
    </style:style>
    <style:style style:name="P3" style:family="paragraph" style:parent-style-name="Heading_20_3">
      <style:text-properties officeooo:rsid="00198ecf" officeooo:paragraph-rsid="00198ecf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 149<text:tab/></text:p>
      <text:p text:style-name="P1">Сервис учёта рабочих мест с компьютерами: характеристики, ПО, лицензии,</text:p>
      <text:p text:style-name="P1">история неисправностей</text:p>
      <text:p text:style-name="P1"/>
      <text:p text:style-name="P1">План работы</text:p>
      <text:p text:style-name="P1"/>
      <text:p text:style-name="P1">создать репо на гитхабе</text:p>
      <text:p text:style-name="P1">проанализировать задачу</text:p>
      <text:p text:style-name="P1">составить план работы и задач</text:p>
      <text:p text:style-name="P1">реализовать планы и задачи</text:p>
      <text:p text:style-name="P1">составить документацию на финальный продукт, презентацию и так далее</text:p>
      <text:p text:style-name="P1">представить работу планы и задачи</text:p>
      <text:p text:style-name="P1"/>
      <text:p text:style-name="P1"/>
      <text:p text:style-name="P2">Структура функционала </text:p>
      <text:h text:style-name="P3" text:outline-level="3">1. Модуль учета оборудования (Учет ПК и периферии)</text:h>
      <text:p text:style-name="Text_20_body">Этот блок отвечает за «железо». Важно не просто записать, что есть компьютер, но и знать, из чего он состоит.</text:p>
      <text:list text:style-name="L1">
        <text:list-item>
          <text:p text:style-name="P4"><text:span text:style-name="T1">Карточка компьютера:</text:span> Уникальный инвентарный номер, MAC-адрес, IP-адрес (если статический).</text:p>
        </text:list-item>
        <text:list-item>
          <text:p text:style-name="P4"><text:span text:style-name="T1">Характеристики комплектующих:</text:span> Детальное описание процессора, видеокарты, объема ОЗУ и типа/объема накопителей (SSD/HDD).</text:p>
        </text:list-item>
        <text:list-item>
          <text:p text:style-name="P4"><text:span text:style-name="T1">Периферия:</text:span> Привязка к ПК мониторов (с их диагоналями и матрицами), ИБП, принтеров или сканеров.</text:p>
        </text:list-item>
        <text:list-item>
          <text:p text:style-name="P4"><text:span text:style-name="T1">Статус оборудования:</text:span> «В работе», «На складе», «В ремонте», «Списано».</text:p>
        </text:list-item>
      </text:list>
      <text:h text:style-name="Heading_20_3" text:outline-level="3">2. Модуль управления ПО и лицензиями</text:h>
      <text:p text:style-name="Text_20_body">Контроль за тем, что установлено на машинах, чтобы избежать штрафов за пиратский софт и вовремя продлевать подписки.</text:p>
      <text:list text:style-name="L2">
        <text:list-item>
          <text:p text:style-name="P5"><text:span text:style-name="T1">Реестр установленного софта:</text:span> Список программ на каждом рабочем месте (ОС, офисные пакеты, специализированные программы для 3D или монтажа).</text:p>
        </text:list-item>
        <text:list-item>
          <text:p text:style-name="P5"><text:span text:style-name="T1">Менеджер лицензий:</text:span> Хранение ключей активации, типа лицензии (разовая, подписка, open-source) и количества доступных/занятых мест.</text:p>
        </text:list-item>
        <text:list-item>
          <text:p text:style-name="P5"><text:span text:style-name="T1">Уведомления:</text:span> Автоматические алерты (цветовая индикация или сообщения), когда срок действия лицензии подходит к концу.</text:p>
        </text:list-item>
      </text:list>
      <text:h text:style-name="Heading_20_3" text:outline-level="3">3. Модуль истории неисправностей (Service Desk / Helpdesk)</text:h>
      <text:p text:style-name="Text_20_body">Инструмент для отслеживания поломок и ремонтов, который поможет выявить проблемную технику.</text:p>
      <text:list text:style-name="L3">
        <text:list-item>
          <text:p text:style-name="P6"><text:span text:style-name="T1">Журнал инцидентов:</text:span> Логирование каждой проблемы (например, «перегревается видеокарта», «не работает порт»).</text:p>
        </text:list-item>
        <text:list-item>
          <text:p text:style-name="P6"><text:soft-page-break/><text:span text:style-name="T1">Тикет-система:</text:span> Создание заявок на ремонт со статусами («Открыта», «В процессе», «Решена»).</text:p>
        </text:list-item>
        <text:list-item>
          <text:p text:style-name="P6"><text:span text:style-name="T1">История обслуживания:</text:span> Записи о том, что было сделано (замена термопасты, апгрейд ОЗУ, переустановка ОС), когда и кем.</text:p>
        </text:list-item>
        <text:list-item>
          <text:p text:style-name="P6"><text:span text:style-name="T1">Связь запчастей и ремонта:</text:span> Возможность указать, какие новые комплектующие были установлены в ходе ремонта.</text:p>
        </text:list-item>
      </text:list>
      <text:h text:style-name="Heading_20_3" text:outline-level="3">4. Модуль управления рабочими местами</text:h>
      <text:p text:style-name="Text_20_body">Привязка техники к реальным людям и кабинетам.</text:p>
      <text:list text:style-name="L4">
        <text:list-item>
          <text:p text:style-name="P7"><text:span text:style-name="T1">Карточка сотрудника:</text:span> ФИО, должность, отдел.</text:p>
        </text:list-item>
        <text:list-item>
          <text:p text:style-name="P7"><text:span text:style-name="T1">Топология:</text:span> Привязка компьютера к конкретному кабинету и рабочему столу.</text:p>
        </text:list-item>
        <text:list-item>
          <text:p text:style-name="P7"><text:span text:style-name="T1">Интерактивный интерфейс:</text:span> В идеале — реализация простых информационных карточек, которые всплывают при выборе рабочего места, показывая, кто там сидит и какая техника числится.</text:p>
        </text:list-item>
      </text:list>
      <text:h text:style-name="Heading_20_3" text:outline-level="3">5. Административный и системный функционал</text:h>
      <text:list text:style-name="L5">
        <text:list-item>
          <text:p text:style-name="P8"><text:span text:style-name="T1">Ролевая модель:</text:span> Разделение прав доступа (Администратор/Системный администратор — полный доступ; Руководитель — только просмотр отчетов; Обычный пользователь — возможность только создать заявку о поломке).</text:p>
        </text:list-item>
        <text:list-item>
          <text:p text:style-name="P8"><text:span text:style-name="T1">Поиск и фильтрация:</text:span> Быстрый поиск по инвентарному номеру, фильтрация ПК по наличию определенной видеокарты или версии ОС.</text:p>
        </text:list-item>
        <text:list-item>
          <text:p text:style-name="P8"><text:span text:style-name="T1">Отчеты:</text:span> Выгрузка данных (например, «список ПК, требующих апгрейда ОЗУ» или «список истекающих лицензий на этот месяц»).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Droid Sans" style:font-family-complex="'Droid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Droid Sans" style:font-family-complex="'Droid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Droid Sans" style:font-family-complex="'Droid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5-19T14:24:13.213705624</dc:date>
    <meta:editing-duration>PT28M2S</meta:editing-duration>
    <meta:editing-cycles>5</meta:editing-cycles>
    <meta:document-statistic meta:table-count="0" meta:image-count="0" meta:object-count="0" meta:page-count="2" meta:paragraph-count="37" meta:word-count="382" meta:character-count="2850" meta:non-whitespace-character-count="2516"/>
  </office:meta>
</office:document-meta>
</file>