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17f33d"/>
    </style:style>
    <style:style style:name="T3" style:family="text">
      <style:text-properties fo:font-style="italic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ТЕХНИЧЕСКАЯ СПЕЦИФИКАЦИЯ ПРОЕКТА</text:h>
      <text:p text:style-name="P2"><text:span text:style-name="T1">Название проекта:</text:span> <text:span text:style-name="T2">CoreAsset - c</text:span>ервис учёта рабочих мест и IT-активов</text:p>
      <text:p text:style-name="P2"/>
      <text:h text:style-name="P3" text:outline-level="2">1. Цели и задачи проекта (Проблема и Решение)</text:h>
      <text:list text:style-name="L1">
        <text:list-item>
          <text:p text:style-name="P4"><text:span text:style-name="T1">Проблема:</text:span> В организациях учет компьютеров, комплектующих и лицензий часто ведется разрозненно (в Excel-таблицах или бумажных журналах). Это приводит к потере контроля над расходами на ПО, затягиванию процесса ремонта и путанице при увольнении или ротации сотрудников.</text:p>
        </text:list-item>
        <text:list-item>
          <text:p text:style-name="P4"><text:span text:style-name="T1">Решение:</text:span> Создание единой веб-системы для централизованного мониторинга физических рабочих мест, детальных характеристик «железа», контроля юридической чистоты софта (лицензий) и автоматизации обработки заявок о неисправностях.</text:p>
        </text:list-item>
        <text:list-item>
          <text:p text:style-name="P4"><text:span text:style-name="T1">Бизнес-ценность:</text:span> Сокращение времени простоя техники, оптимизация затрат на закупку лицензий ПО, прозрачная история обслуживания каждого компьютера.</text:p>
        </text:list-item>
      </text:list>
      <text:h text:style-name="P3" text:outline-level="2">2. Архитектура и Технологический стек</text:h>
      <text:p text:style-name="P2">Проект строится на базе современной событийно-ориентированной веб-архитектуры:</text:p>
      <text:list text:style-name="L2">
        <text:list-item>
          <text:p text:style-name="P5"><text:span text:style-name="T1">Frontend:</text:span> Framework <text:span text:style-name="T1">Next.js</text:span> (React) с использованием Tailwind CSS для UI. Обеспечивает быстродействие, модульность интерфейса и удобную работу с динамическими таблицами.</text:p>
        </text:list-item>
        <text:list-item>
          <text:p text:style-name="P5"><text:span text:style-name="T1">Backend &amp; Database:</text:span> <text:span text:style-name="T1">Supabase</text:span> (PostgreSQL) — выступает в качестве BaaS (Backend-as-a-Service). Хранит реляционные данные, обеспечивает аутентификацию пользователей и предоставляет готовый REST API для CRUD-операций.</text:p>
        </text:list-item>
        <text:list-item>
          <text:p text:style-name="P5"><text:span text:style-name="T1">Взаимодействие:</text:span> Клиентское приложение общается с Supabase напрямую через безопасный SDK с контролем прав доступа на уровне строк (RLS - Row Level Security).</text:p>
        </text:list-item>
      </text:list>
      <text:h text:style-name="P3" text:outline-level="2">3. Детальные функциональные требования</text:h>
      <text:p text:style-name="P2">Система разделена на 4 основных функциональных модуля, управляемых через единую административную панель.</text:p>
      <text:h text:style-name="P6" text:outline-level="3"><text:soft-page-break/>Модуль 1: Управление структурой офиса и сотрудниками</text:h>
      <text:list text:style-name="L3">
        <text:list-item>
          <text:p text:style-name="P7">Создание, редактирование и удаление карточек сотрудников (ФИО, Департамент, Должность).</text:p>
        </text:list-item>
        <text:list-item>
          <text:p text:style-name="P7">Учет физических локаций (Кабинеты, Номера столов).</text:p>
        </text:list-item>
        <text:list-item>
          <text:p text:style-name="P7">Закрепление конкретного рабочего места за сотрудником (с возможностью оставить место вакантным).</text:p>
        </text:list-item>
      </text:list>
      <text:h text:style-name="P6" text:outline-level="3">Модуль 2: Учет оборудования и «железа» (Hardware Asset Management)</text:h>
      <text:list text:style-name="L4">
        <text:list-item>
          <text:p text:style-name="P8">Регистрация системных блоков и ноутбуков с уникальными инвентарными номерами.</text:p>
        </text:list-item>
        <text:list-item>
          <text:p text:style-name="P8">Привязка компьютера к рабочему месту (или отметка «На складе»).</text:p>
        </text:list-item>
        <text:list-item>
          <text:p text:style-name="P8">Спецификация комплектующих по категориям (CPU, GPU, RAM, Накопители) с использованием гибкого формата данных (JSONB) для хранения индивидуальных характеристик плат и модулей.</text:p>
        </text:list-item>
        <text:list-item>
          <text:p text:style-name="P8">Отслеживание жизненного цикла устройства (Статусы: <text:span text:style-name="T3">В работе, На складе, В ремонте, Списан</text:span>).</text:p>
        </text:list-item>
      </text:list>
      <text:h text:style-name="P6" text:outline-level="3">Модуль 3: Учет ПО и лицензий (Software Asset Management)</text:h>
      <text:list text:style-name="L5">
        <text:list-item>
          <text:p text:style-name="P9">Ведение единого каталога разрешенного в компании софта.</text:p>
        </text:list-item>
        <text:list-item>
          <text:p text:style-name="P9">Учет закупленных лицензионных ключей (Тип: <text:span text:style-name="T3">подписка/бессрочная</text:span>, Лимит активаций, Срок действия).</text:p>
        </text:list-item>
        <text:list-item>
          <text:p text:style-name="P9">Фиксация установки ПО на конкретный компьютер с автоматическим уменьшением счетчика доступных лицензий.</text:p>
        </text:list-item>
        <text:list-item>
          <text:p text:style-name="P9">Визуальное выделение (цветовая индикация) софта, у которого истекает срок подписки (менее 30 дней).</text:p>
        </text:list-item>
      </text:list>
      <text:h text:style-name="P6" text:outline-level="3">Модуль 4: Модуль Service Desk (История неисправностей)</text:h>
      <text:list text:style-name="L6">
        <text:list-item>
          <text:p text:style-name="P10">Регистрация инцидентов (Поломка, сбой ПО, плановое ТО) с привязкой к конкретному компьютеру.</text:p>
        </text:list-item>
        <text:list-item>
          <text:p text:style-name="P10">Назначение приоритета (Низкий, Средний, Высокий, Критический) и отслеживание статуса (<text:span text:style-name="T3">Открыт, В работе, Исправлен</text:span>).</text:p>
        </text:list-item>
        <text:list-item>
          <text:p text:style-name="P10">Архивирование истории ремонтов для проведения аналитики (выявление «слабых» мест в закупках железа).</text:p>
        </text:list-item>
      </text:list>
      <text:h text:style-name="P3" text:outline-level="2"><text:soft-page-break/>4. Нефункциональные требования и Ограничения</text:h>
      <text:list text:style-name="L7">
        <text:list-item>
          <text:p text:style-name="P11"><text:span text:style-name="T1">Безопасность (Авторизация):</text:span> Доступ к системе строго по логину и паролю через Supabase Auth. Ролевая модель: <text:span text:style-name="T3">Администратор</text:span> (полные права), <text:span text:style-name="T3">Техник/Сисадмин</text:span> (редактирование железа и тикетов), <text:span text:style-name="T3">Руководитель</text:span> (только просмотр отчетов).</text:p>
        </text:list-item>
        <text:list-item>
          <text:p text:style-name="P11"><text:span text:style-name="T1">Производительность:</text:span> Время отклика интерфейса при поиске по инвентарному номеру или MAC-адресу не должно превышать 200 мс при объеме базы до 10,000 устройств.</text:p>
        </text:list-item>
        <text:list-item>
          <text:p text:style-name="P11"><text:span text:style-name="T1">Интерфейс и адаптивность:</text:span> Интерфейс должен быть оптимизирован под desktop-разрешения (основное рабочее место сисадмина), иметь scannable-таблицы (четкая структура данных без визуального шума) и поддерживать фильтрацию «на лету».</text:p>
        </text:list-item>
        <text:list-item>
          <text:p text:style-name="P12"><text:span text:style-name="T4">Целостность данных:</text:span><text:span text:style-name="T5"> База данных должна использовать каскадные правила (</text:span><text:span text:style-name="Source_20_Text"><text:span text:style-name="T5">ON DELETE CASCADE</text:span></text:span><text:span text:style-name="T5"> / </text:span><text:span text:style-name="Source_20_Text"><text:span text:style-name="T5">SET NULL</text:span></text:span><text:span text:style-name="T5">), исключающие появление «битых» ссылок (например, поломка не может существовать без привязанного к ней ПК).</text:span></text:p>
        </text:list-item>
      </text:list>
      <text:h text:style-name="P3" text:outline-level="2">5. План реализации проекта (Этапы разработки)</text:h>
      <text:p text:style-name="P2">Для успешного контроля прогресса разработка разбивается на логическую последовательность шагов:</text:p>
      <text:p text:style-name="P13"><text:span text:style-name="Strong_20_Emphasis"><text:span text:style-name="T5">1.Развертывание БД и Инфраструктуры: </text:span></text:span><text:span text:style-name="T5">Срок: Неделя 1.</text:span></text:p>
      <text:p text:style-name="P2">Развертывание проекта в Supabase. Запуск SQL-скрипта инициализации таблиц (employees, workplaces, computers, hardware, software, licenses, fault_history). Включение политик безопасности Row Level Security (RLS).</text:p>
      <text:p text:style-name="P13"><text:span text:style-name="Strong_20_Emphasis"><text:span text:style-name="T5">2.Генерация тестового контура (Seed Data):</text:span></text:span><text:span text:style-name="T5">Срок: Неделя 1.</text:span></text:p>
      <text:p text:style-name="P2">Заполнение базы данных демонстрационными реалистичными данными: создание 10 сотрудников, 5 конфигураций ПК с детальным описанием железа, привязка лицензий Windows/Adobe. Это необходимо для тестирования интерфейса.</text:p>
      <text:p text:style-name="P13"><text:span text:style-name="Strong_20_Emphasis"><text:span text:style-name="T5">3.Разработка Базового UI (Read-only Дашборды):</text:span></text:span><text:span text:style-name="T5">Срок: Неделя 2.</text:span></text:p>
      <text:p text:style-name="P2">Создание каркаса Next.js приложения. Отрисовка интерактивных таблиц для вывода списков оборудования, софта и активных поломок. Реализация механики сквозного поиска и фильтрации данных на клиенте.</text:p>
      <text:p text:style-name="P13"><text:span text:style-name="Strong_20_Emphasis"><text:span text:style-name="T5">4.Интеграция Бизнес-логики (CRUD операции):</text:span></text:span><text:span text:style-name="T5">Срок: Неделя 3.</text:span></text:p>
      <text:p text:style-name="P2"><text:soft-page-break/>Связывание экранных форм с базой данных через Supabase SDK. Реализация функций: добавление нового сотрудника, постановка ПК на ремонт, привязка лицензии к компьютеру, списание техники.</text:p>
      <text:p text:style-name="P13"><text:span text:style-name="Strong_20_Emphasis"><text:span text:style-name="T5">5.Тестирование и Финализация: </text:span></text:span><text:span text:style-name="T5">Срок: Неделя 4.</text:span></text:p>
      <text:p text:style-name="P2">Проверка ролевой модели доступа. Стресс-тестирование каскадного удаления данных. Проверка корректности работы уведомлений об истекающих лицензиях. Сдача проекта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Droid Sans" style:font-family-complex="'Droid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Droid Sans" style:font-family-complex="'Droid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5-19T14:49:38.505268904</dc:date>
    <meta:editing-duration>PT1M55S</meta:editing-duration>
    <meta:editing-cycles>3</meta:editing-cycles>
    <meta:document-statistic meta:table-count="0" meta:image-count="0" meta:object-count="0" meta:page-count="4" meta:paragraph-count="48" meta:word-count="669" meta:character-count="5372" meta:non-whitespace-character-count="4774"/>
  </office:meta>
</office:document-meta>
</file>