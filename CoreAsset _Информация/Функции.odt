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Text_20_body" style:list-style-name="L1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fo:font-weight="bold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fo:font-weight="bold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text-properties fo:font-weight="bold"/>
    </style:style>
    <style:style style:name="P10" style:family="paragraph" style:parent-style-name="Text_20_body" style:list-style-name="L5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ТАБЛИЦА ФУНКЦИЙ СЕРВИСА УЧЕТА РАБОЧИХ МЕСТ</text:h>
      <text:h text:style-name="Heading_20_4" text:outline-level="4">1. Модуль: Учет структуры офиса и сотрудников</text:h>
      <text:list text:style-name="L1">
        <text:list-item>
          <text:p text:style-name="P1">Функция 1: CRUD сотрудников</text:p>
          <text:list>
            <text:list-item>
              <text:p text:style-name="P2"><text:span text:style-name="T1">Описание:</text:span> Ввод, просмотр, редактирование и удаление карточек персонала (ФИО, департамент, должность).</text:p>
            </text:list-item>
            <text:list-item>
              <text:p text:style-name="P2"><text:span text:style-name="T1">Пользователь:</text:span> Системный администратор</text:p>
              <text:p text:style-name="P2"/>
            </text:list-item>
          </text:list>
        </text:list-item>
        <text:list-item>
          <text:p text:style-name="P1">Функция 2: Учет рабочих мест</text:p>
          <text:list>
            <text:list-item>
              <text:p text:style-name="P2"><text:span text:style-name="T1">Описание:</text:span> Закрепление рабочего места за сотрудником (кабинет, стол) или перевод места в статус «Вакантно» без удаления истории оборудования.</text:p>
            </text:list-item>
            <text:list-item>
              <text:p text:style-name="P2"><text:span text:style-name="T1">Пользователь:</text:span> Системный администратор</text:p>
            </text:list-item>
            <text:list-item>
              <text:p text:style-name="P2"><text:span text:style-name="T1">Приоритет:</text:span> Обязательно</text:p>
              <text:p text:style-name="P2"/>
            </text:list-item>
          </text:list>
        </text:list-item>
        <text:list-item>
          <text:p text:style-name="P1">Функция 3: Фильтрация сотрудников</text:p>
          <text:list>
            <text:list-item>
              <text:p text:style-name="P2"><text:span text:style-name="T1">Описание:</text:span> Сортировка и фильтрация списка персонала по департаментам и отделам организации.</text:p>
            </text:list-item>
            <text:list-item>
              <text:p text:style-name="P2"><text:span text:style-name="T1">Пользователь:</text:span> Системный администратор, Руководитель IT</text:p>
            </text:list-item>
            <text:list-item>
              <text:p text:style-name="P2"><text:span text:style-name="T1">Приоритет:</text:span> Обязательно</text:p>
              <text:p text:style-name="P2"/>
            </text:list-item>
          </text:list>
        </text:list-item>
      </text:list>
      <text:h text:style-name="Heading_20_4" text:outline-level="4">2. Модуль: Учет оборудования и «железа»</text:h>
      <text:list text:style-name="L2">
        <text:list-item>
          <text:p text:style-name="P3">Функция 4: Регистрация и CRUD техники</text:p>
          <text:list>
            <text:list-item>
              <text:p text:style-name="P4"><text:span text:style-name="T1">Описание:</text:span> Ввод инвентарного номера, сетевых параметров (IP, MAC) и привязка ПК к рабочему месту или складу.</text:p>
            </text:list-item>
            <text:list-item>
              <text:p text:style-name="P4"><text:span text:style-name="T1">Пользователь:</text:span> Системный администратор</text:p>
            </text:list-item>
            <text:list-item>
              <text:p text:style-name="P4"><text:span text:style-name="T1">Приоритет:</text:span> Обязательно</text:p>
              <text:p text:style-name="P4"/>
            </text:list-item>
          </text:list>
        </text:list-item>
        <text:list-item>
          <text:p text:style-name="P3">Функция 5: Детализация комплектующих (JSONB)</text:p>
          <text:list>
            <text:list-item>
              <text:p text:style-name="P4"><text:span text:style-name="T1">Описание:</text:span> Просмотр и редактирование внутренних характеристик «железа» (процессор, видеокарта, ОЗУ, диски) внутри карточки компьютера.</text:p>
            </text:list-item>
            <text:list-item>
              <text:p text:style-name="P4"><text:span text:style-name="T1">Пользователь:</text:span> Системный администратор</text:p>
            </text:list-item>
            <text:list-item>
              <text:p text:style-name="P4"><text:span text:style-name="T1">Приоритет:</text:span> Обязательно</text:p>
            </text:list-item>
            <text:list-item>
              <text:p text:style-name="P4"><text:span text:style-name="T1">День реализации:</text:span> День 12–13</text:p>
            </text:list-item>
          </text:list>
        </text:list-item>
        <text:list-item>
          <text:p text:style-name="P3"><text:soft-page-break/>Функция 6: Сквозной поиск по технике</text:p>
          <text:list>
            <text:list-item>
              <text:p text:style-name="P4"><text:span text:style-name="T1">Описание:</text:span> Быстрый поиск компьютеров «на лету» по инвентарному номеру, MAC-адресу или IP-адресу.</text:p>
            </text:list-item>
            <text:list-item>
              <text:p text:style-name="P4"><text:span text:style-name="T1">Пользователь:</text:span> Системный администратор, Руководитель IT</text:p>
            </text:list-item>
            <text:list-item>
              <text:p text:style-name="P4"><text:span text:style-name="T1">Приоритет:</text:span> Обязательно</text:p>
              <text:p text:style-name="P4"/>
            </text:list-item>
          </text:list>
        </text:list-item>
      </text:list>
      <text:h text:style-name="Heading_20_4" text:outline-level="4">3. Модуль: Контроль ПО и лицензий</text:h>
      <text:list text:style-name="L3">
        <text:list-item>
          <text:p text:style-name="P5">Функция 7: Каталог ПО и привязка ключей</text:p>
          <text:list>
            <text:list-item>
              <text:p text:style-name="P6"><text:span text:style-name="T1">Описание:</text:span> Учет программного обеспечения компании и закрепление за конкретным ПК используемой лицензии.</text:p>
            </text:list-item>
            <text:list-item>
              <text:p text:style-name="P6"><text:span text:style-name="T1">Пользователь:</text:span> Системный администратор</text:p>
            </text:list-item>
            <text:list-item>
              <text:p text:style-name="P6"><text:span text:style-name="T1">Приоритет:</text:span> Обязательно</text:p>
              <text:p text:style-name="P6"/>
            </text:list-item>
          </text:list>
        </text:list-item>
        <text:list-item>
          <text:p text:style-name="P5">Функция 8: Мониторинг остатка лицензий</text:p>
          <text:list>
            <text:list-item>
              <text:p text:style-name="P6"><text:span text:style-name="T1">Описание:</text:span> Автоматический пересчет доступных свободных активаций при установке платного софта на новый ПК.</text:p>
            </text:list-item>
            <text:list-item>
              <text:p text:style-name="P6"><text:span text:style-name="T1">Пользователь:</text:span> Системный администратор, Руководитель IT</text:p>
            </text:list-item>
            <text:list-item>
              <text:p text:style-name="P6"><text:span text:style-name="T1">Приоритет:</text:span> Обязательно</text:p>
            </text:list-item>
          </text:list>
        </text:list-item>
      </text:list>
      <text:p text:style-name="Text_20_body"/>
      <text:list text:continue-numbering="true" text:style-name="L3">
        <text:list-item>
          <text:p text:style-name="P5">Функция 9: Алерты по подпискам</text:p>
          <text:list>
            <text:list-item>
              <text:p text:style-name="P6"><text:span text:style-name="T1">Описание:</text:span> Цветовая индикация и фильтрация софта, у которого истекает срок действия лицензии (менее чем за 30 дней).</text:p>
            </text:list-item>
            <text:list-item>
              <text:p text:style-name="P6"><text:span text:style-name="T1">Пользователь:</text:span> Системный администратор, Руководитель IT</text:p>
            </text:list-item>
            <text:list-item>
              <text:p text:style-name="P6"><text:span text:style-name="T1">Приоритет:</text:span> Желательно</text:p>
              <text:p text:style-name="P6"/>
            </text:list-item>
          </text:list>
        </text:list-item>
      </text:list>
      <text:h text:style-name="Heading_20_4" text:outline-level="4">4. Модуль: Журнал неисправностей (Service Desk)</text:h>
      <text:list text:style-name="L4">
        <text:list-item>
          <text:p text:style-name="P7">Функция 10: Подача заявки (Тикет-система)</text:p>
          <text:list>
            <text:list-item>
              <text:p text:style-name="P8"><text:span text:style-name="T1">Описание:</text:span> Создание записи о сбое или поломке с описанием проблемы и указанием приоритета (Low, Medium, High, Critical).</text:p>
            </text:list-item>
            <text:list-item>
              <text:p text:style-name="P8"><text:span text:style-name="T1">Пользователь:</text:span> Сотрудник, Системный администратор</text:p>
            </text:list-item>
            <text:list-item>
              <text:p text:style-name="P8"><text:span text:style-name="T1">Приоритет:</text:span> Обязательно</text:p>
              <text:p text:style-name="P8"/>
            </text:list-item>
          </text:list>
        </text:list-item>
        <text:list-item>
          <text:p text:style-name="P7"><text:soft-page-break/>Функция 11: Управление статусом ремонта</text:p>
          <text:list>
            <text:list-item>
              <text:p text:style-name="P8"><text:span text:style-name="T1">Описание:</text:span> Изменение статусов инцидентов (Открыт -&gt; В работе -&gt; Исправлен) в процессе устранения проблемы сисадмином.</text:p>
            </text:list-item>
            <text:list-item>
              <text:p text:style-name="P8"><text:span text:style-name="T1">Пользователь:</text:span> Системный администратор</text:p>
            </text:list-item>
            <text:list-item>
              <text:p text:style-name="P8"><text:span text:style-name="T1">Приоритет:</text:span> Обязательно</text:p>
              <text:p text:style-name="P8"/>
            </text:list-item>
          </text:list>
        </text:list-item>
        <text:list-item>
          <text:p text:style-name="P7">Функция 12: Архив и логирование ремонтов</text:p>
          <text:list>
            <text:list-item>
              <text:p text:style-name="P8"><text:span text:style-name="T1">Описание:</text:span> Хранение истории всех прошлых поломок и замененных деталей, привязанных к конкретному компьютеру.</text:p>
            </text:list-item>
            <text:list-item>
              <text:p text:style-name="P8"><text:span text:style-name="T1">Пользователь:</text:span> Системный администратор, Руководитель IT</text:p>
            </text:list-item>
            <text:list-item>
              <text:p text:style-name="P8"><text:span text:style-name="T1">Приоритет:</text:span> Обязательно</text:p>
              <text:p text:style-name="P8"/>
            </text:list-item>
          </text:list>
        </text:list-item>
      </text:list>
      <text:h text:style-name="Heading_20_4" text:outline-level="4">5. Модуль: Системные функции и отчетность</text:h>
      <text:list text:style-name="L5">
        <text:list-item>
          <text:p text:style-name="P9">Функция 13: Подтверждение опасных действий</text:p>
          <text:list>
            <text:list-item>
              <text:p text:style-name="P10"><text:span text:style-name="T1">Описание:</text:span> Обязательный вывод модального окна-предупреждения («Вы уверены?») при попытке удаления любой записи из базы данных.</text:p>
            </text:list-item>
            <text:list-item>
              <text:p text:style-name="P10"><text:span text:style-name="T1">Пользователь:</text:span> Все пользователи с правами удаления</text:p>
            </text:list-item>
            <text:list-item>
              <text:p text:style-name="P10"><text:span text:style-name="T1">Приоритет:</text:span> Обязательно</text:p>
              <text:p text:style-name="P10"/>
            </text:list-item>
          </text:list>
        </text:list-item>
        <text:list-item>
          <text:p text:style-name="P9">Функция 14: Валидация форм и обработка ошибок</text:p>
          <text:list>
            <text:list-item>
              <text:p text:style-name="P10"><text:span text:style-name="T1">Описание:</text:span> Проверка корректности ввода данных (маски IP/MAC-адресов, обязательные поля) и вывод понятных пользователю предупреждений.</text:p>
            </text:list-item>
            <text:list-item>
              <text:p text:style-name="P10"><text:span text:style-name="T1">Пользователь:</text:span> Все категории пользователей</text:p>
            </text:list-item>
            <text:list-item>
              <text:p text:style-name="P10"><text:span text:style-name="T1">Приоритет:</text:span> Обязательно</text:p>
              <text:p text:style-name="P10"/>
            </text:list-item>
          </text:list>
        </text:list-item>
        <text:list-item>
          <text:p text:style-name="P9">Функция 15: Формирование аналитической сводки</text:p>
          <text:list>
            <text:list-item>
              <text:p text:style-name="P10"><text:span text:style-name="T1">Описание:</text:span> Расчет и вывод на главный дашборд итоговой статистики по парку ПК (процент исправной техники, загруженность лицензий, количество открытых заявок).</text:p>
            </text:list-item>
            <text:list-item>
              <text:p text:style-name="P10"><text:span text:style-name="T1">Пользователь:</text:span> Руководитель IT, Системный администратор</text:p>
            </text:list-item>
            <text:list-item>
              <text:p text:style-name="P10"><text:span text:style-name="T1">Приоритет:</text:span> Обязательно</text:p>
              <text:p text:style-name="P10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5-19T14:36:57.288920725</dc:date>
    <meta:editing-duration>PT2M10S</meta:editing-duration>
    <meta:editing-cycles>1</meta:editing-cycles>
    <meta:document-statistic meta:table-count="0" meta:image-count="0" meta:object-count="0" meta:page-count="3" meta:paragraph-count="79" meta:word-count="503" meta:character-count="3646" meta:non-whitespace-character-count="3282"/>
  </office:meta>
</office:document-meta>
</file>